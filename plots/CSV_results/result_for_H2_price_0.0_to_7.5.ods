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1.2902in"/>
    </style:style>
    <style:style style:name="co3" style:family="table-column">
      <style:table-column-properties fo:break-before="auto" style:column-width="1.1937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_for_H2_price_0.0_to_7.5" table:style-name="ta1">
        <table:shapes>
          <draw:frame draw:z-index="0" draw:style-name="gr1" draw:text-style-name="P1" svg:width="6.2988in" svg:height="3.5429in" svg:x="0.3839in" svg:y="4.0134in">
            <draw:object draw:notify-on-update-of-ranges="'result_for_H2_price_0.0_to_7.5'.B1:'result_for_H2_price_0.0_to_7.5'.B1 'result_for_H2_price_0.0_to_7.5'.C2:'result_for_H2_price_0.0_to_7.5'.C21 'result_for_H2_price_0.0_to_7.5'.A2:'result_for_H2_price_0.0_to_7.5'.A21 'result_for_H2_price_0.0_to_7.5'.L2:'result_for_H2_price_0.0_to_7.5'.L21 'result_for_H2_price_0.0_to_7.5'.A2:'result_for_H2_price_0.0_to_7.5'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H2_price</text:p>
          </table:table-cell>
          <table:table-cell office:value-type="string" calcext:value-type="string">
            <text:p>LCOE</text:p>
          </table:table-cell>
          <table:table-cell office:value-type="string" calcext:value-type="string">
            <text:p>real_LCOE</text:p>
          </table:table-cell>
          <table:table-cell office:value-type="string" calcext:value-type="string">
            <text:p>power_rated_fc</text:p>
          </table:table-cell>
          <table:table-cell office:value-type="string" calcext:value-type="string">
            <text:p>power_rated_ele</text:p>
          </table:table-cell>
          <table:table-cell office:value-type="string" calcext:value-type="string">
            <text:p>energy_rated_sto</text:p>
          </table:table-cell>
          <table:table-cell office:value-type="string" calcext:value-type="string">
            <text:p>power_rated_pv</text:p>
          </table:table-cell>
          <table:table-cell office:value-type="string" calcext:value-type="string">
            <text:p>power_rated_wi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st_Q</text:p>
          </table:table-cell>
          <table:table-cell office:value-type="string" calcext:value-type="string">
            <text:p>range_Q</text:p>
          </table:table-cell>
          <table:table-cell table:style-name="Default" office:value-type="string" calcext:value-type="string">
            <text:p>cost_fini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.4093462061616" calcext:value-type="float">
            <text:p>47.4093462061616</text:p>
          </table:table-cell>
          <table:table-cell office:value-type="float" office:value="128.387760483239" calcext:value-type="float">
            <text:p>128.387760483239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80.9784142770778" calcext:value-type="float">
            <text:p>80.9784142770778</text:p>
          </table:table-cell>
          <table:table-cell office:value-type="float" office:value="17639.5249451754" calcext:value-type="float">
            <text:p>17639.5249451754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0.394736842105263" calcext:value-type="float">
            <text:p>0.394736842105263</text:p>
          </table:table-cell>
          <table:table-cell office:value-type="float" office:value="72.0805866622234" calcext:value-type="float">
            <text:p>72.0805866622234</text:p>
          </table:table-cell>
          <table:table-cell office:value-type="float" office:value="128.38776048324" calcext:value-type="float">
            <text:p>128.38776048324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80.9784142770778" calcext:value-type="float">
            <text:p>80.9784142770778</text:p>
          </table:table-cell>
          <table:table-cell office:value-type="float" office:value="17639.5249451754" calcext:value-type="float">
            <text:p>17639.5249451754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0.789473684210526" calcext:value-type="float">
            <text:p>0.789473684210526</text:p>
          </table:table-cell>
          <table:table-cell office:value-type="float" office:value="96.7518271182846" calcext:value-type="float">
            <text:p>96.7518271182846</text:p>
          </table:table-cell>
          <table:table-cell office:value-type="float" office:value="128.387760483239" calcext:value-type="float">
            <text:p>128.387760483239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80.9784142770778" calcext:value-type="float">
            <text:p>80.9784142770778</text:p>
          </table:table-cell>
          <table:table-cell office:value-type="float" office:value="17639.5249451754" calcext:value-type="float">
            <text:p>17639.5249451754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1.18421052631579" calcext:value-type="float">
            <text:p>1.18421052631579</text:p>
          </table:table-cell>
          <table:table-cell office:value-type="float" office:value="116.799880498978" calcext:value-type="float">
            <text:p>116.799880498978</text:p>
          </table:table-cell>
          <table:table-cell office:value-type="float" office:value="123.805881181061" calcext:value-type="float">
            <text:p>123.805881181061</text:p>
          </table:table-cell>
          <table:table-cell office:value-type="float" office:value="1480.97347883735" calcext:value-type="float">
            <text:p>1480.97347883735</text:p>
          </table:table-cell>
          <table:table-cell office:value-type="float" office:value="0" calcext:value-type="float">
            <text:p>0</text:p>
          </table:table-cell>
          <table:table-cell office:value-type="float" office:value="153.135828983471" calcext:value-type="float">
            <text:p>153.135828983471</text:p>
          </table:table-cell>
          <table:table-cell office:value-type="float" office:value="614.78612992823" calcext:value-type="float">
            <text:p>614.78612992823</text:p>
          </table:table-cell>
          <table:table-cell office:value-type="float" office:value="574.132343486041" calcext:value-type="float">
            <text:p>574.132343486041</text:p>
          </table:table-cell>
          <table:table-cell office:value-type="string" calcext:value-type="string">
            <text:p>OPTIMAL</text:p>
          </table:table-cell>
          <table:table-cell office:value-type="float" office:value="51.8620130496061" calcext:value-type="float">
            <text:p>51.8620130496061</text:p>
          </table:table-cell>
          <table:table-cell office:value-type="float" office:value="10688.990235723" calcext:value-type="float">
            <text:p>10688.990235723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1.57894736842105" calcext:value-type="float">
            <text:p>1.57894736842105</text:p>
          </table:table-cell>
          <table:table-cell office:value-type="float" office:value="129.732948899725" calcext:value-type="float">
            <text:p>129.732948899725</text:p>
          </table:table-cell>
          <table:table-cell office:value-type="float" office:value="125.07062668136" calcext:value-type="float">
            <text:p>125.07062668136</text:p>
          </table:table-cell>
          <table:table-cell office:value-type="float" office:value="1477.96716459576" calcext:value-type="float">
            <text:p>1477.96716459576</text:p>
          </table:table-cell>
          <table:table-cell office:value-type="float" office:value="0" calcext:value-type="float">
            <text:p>0</text:p>
          </table:table-cell>
          <table:table-cell office:value-type="float" office:value="133.960628677856" calcext:value-type="float">
            <text:p>133.960628677856</text:p>
          </table:table-cell>
          <table:table-cell office:value-type="float" office:value="664.408388405808" calcext:value-type="float">
            <text:p>664.408388405808</text:p>
          </table:table-cell>
          <table:table-cell office:value-type="float" office:value="863.6072094179" calcext:value-type="float">
            <text:p>863.6072094179</text:p>
          </table:table-cell>
          <table:table-cell office:value-type="string" calcext:value-type="string">
            <text:p>OPTIMAL</text:p>
          </table:table-cell>
          <table:table-cell office:value-type="float" office:value="42.0666903909127" calcext:value-type="float">
            <text:p>42.0666903909127</text:p>
          </table:table-cell>
          <table:table-cell office:value-type="float" office:value="8350.69541701794" calcext:value-type="float">
            <text:p>8350.69541701794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1.97368421052632" calcext:value-type="float">
            <text:p>1.97368421052632</text:p>
          </table:table-cell>
          <table:table-cell office:value-type="float" office:value="140.738175714272" calcext:value-type="float">
            <text:p>140.738175714272</text:p>
          </table:table-cell>
          <table:table-cell office:value-type="float" office:value="126.74467242189" calcext:value-type="float">
            <text:p>126.74467242189</text:p>
          </table:table-cell>
          <table:table-cell office:value-type="float" office:value="1466.73444758993" calcext:value-type="float">
            <text:p>1466.73444758993</text:p>
          </table:table-cell>
          <table:table-cell office:value-type="float" office:value="0" calcext:value-type="float">
            <text:p>0</text:p>
          </table:table-cell>
          <table:table-cell office:value-type="float" office:value="147.743820954179" calcext:value-type="float">
            <text:p>147.743820954179</text:p>
          </table:table-cell>
          <table:table-cell office:value-type="float" office:value="686.523484513601" calcext:value-type="float">
            <text:p>686.523484513601</text:p>
          </table:table-cell>
          <table:table-cell office:value-type="float" office:value="988.674725286657" calcext:value-type="float">
            <text:p>988.674725286657</text:p>
          </table:table-cell>
          <table:table-cell office:value-type="string" calcext:value-type="string">
            <text:p>OPTIMAL</text:p>
          </table:table-cell>
          <table:table-cell office:value-type="float" office:value="38.5525945089241" calcext:value-type="float">
            <text:p>38.5525945089241</text:p>
          </table:table-cell>
          <table:table-cell office:value-type="float" office:value="7511.82645071655" calcext:value-type="float">
            <text:p>7511.82645071655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2.36842105263158" calcext:value-type="float">
            <text:p>2.36842105263158</text:p>
          </table:table-cell>
          <table:table-cell office:value-type="float" office:value="150.840322145068" calcext:value-type="float">
            <text:p>150.840322145068</text:p>
          </table:table-cell>
          <table:table-cell office:value-type="float" office:value="128.709909152454" calcext:value-type="float">
            <text:p>128.709909152454</text:p>
          </table:table-cell>
          <table:table-cell office:value-type="float" office:value="1441.18804847836" calcext:value-type="float">
            <text:p>1441.18804847836</text:p>
          </table:table-cell>
          <table:table-cell office:value-type="float" office:value="0" calcext:value-type="float">
            <text:p>0</text:p>
          </table:table-cell>
          <table:table-cell office:value-type="float" office:value="244.320516849043" calcext:value-type="float">
            <text:p>244.320516849043</text:p>
          </table:table-cell>
          <table:table-cell office:value-type="float" office:value="764.579306895096" calcext:value-type="float">
            <text:p>764.579306895096</text:p>
          </table:table-cell>
          <table:table-cell office:value-type="float" office:value="1061.00622516902" calcext:value-type="float">
            <text:p>1061.00622516902</text:p>
          </table:table-cell>
          <table:table-cell office:value-type="string" calcext:value-type="string">
            <text:p>OPTIMAL</text:p>
          </table:table-cell>
          <table:table-cell office:value-type="float" office:value="36.1870146734436" calcext:value-type="float">
            <text:p>36.1870146734436</text:p>
          </table:table-cell>
          <table:table-cell office:value-type="float" office:value="6947.12600487387" calcext:value-type="float">
            <text:p>6947.12600487387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2.76315789473684" calcext:value-type="float">
            <text:p>2.76315789473684</text:p>
          </table:table-cell>
          <table:table-cell office:value-type="float" office:value="160.258639513484" calcext:value-type="float">
            <text:p>160.258639513484</text:p>
          </table:table-cell>
          <table:table-cell office:value-type="float" office:value="130.672225785428" calcext:value-type="float">
            <text:p>130.672225785428</text:p>
          </table:table-cell>
          <table:table-cell office:value-type="float" office:value="1414.72112185588" calcext:value-type="float">
            <text:p>1414.72112185588</text:p>
          </table:table-cell>
          <table:table-cell office:value-type="float" office:value="0" calcext:value-type="float">
            <text:p>0</text:p>
          </table:table-cell>
          <table:table-cell office:value-type="float" office:value="388.151486007307" calcext:value-type="float">
            <text:p>388.151486007307</text:p>
          </table:table-cell>
          <table:table-cell office:value-type="float" office:value="836.762533272432" calcext:value-type="float">
            <text:p>836.762533272432</text:p>
          </table:table-cell>
          <table:table-cell office:value-type="float" office:value="1110.57338673124" calcext:value-type="float">
            <text:p>1110.57338673124</text:p>
          </table:table-cell>
          <table:table-cell office:value-type="string" calcext:value-type="string">
            <text:p>OPTIMAL</text:p>
          </table:table-cell>
          <table:table-cell office:value-type="float" office:value="34.4936065147687" calcext:value-type="float">
            <text:p>34.4936065147687</text:p>
          </table:table-cell>
          <table:table-cell office:value-type="float" office:value="6542.88332075278" calcext:value-type="float">
            <text:p>6542.88332075278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3.15789473684211" calcext:value-type="float">
            <text:p>3.15789473684211</text:p>
          </table:table-cell>
          <table:table-cell office:value-type="float" office:value="169.020613001523" calcext:value-type="float">
            <text:p>169.020613001523</text:p>
          </table:table-cell>
          <table:table-cell office:value-type="float" office:value="134.948353446746" calcext:value-type="float">
            <text:p>134.948353446746</text:p>
          </table:table-cell>
          <table:table-cell office:value-type="float" office:value="1359.95765213709" calcext:value-type="float">
            <text:p>1359.95765213709</text:p>
          </table:table-cell>
          <table:table-cell office:value-type="float" office:value="56.5380309944108" calcext:value-type="float">
            <text:p>56.5380309944108</text:p>
          </table:table-cell>
          <table:table-cell office:value-type="float" office:value="774.599679782117" calcext:value-type="float">
            <text:p>774.599679782117</text:p>
          </table:table-cell>
          <table:table-cell office:value-type="float" office:value="957.551863022933" calcext:value-type="float">
            <text:p>957.551863022933</text:p>
          </table:table-cell>
          <table:table-cell office:value-type="float" office:value="1170.54846474278" calcext:value-type="float">
            <text:p>1170.54846474278</text:p>
          </table:table-cell>
          <table:table-cell office:value-type="string" calcext:value-type="string">
            <text:p>OPTIMAL</text:p>
          </table:table-cell>
          <table:table-cell office:value-type="float" office:value="31.6998091473053" calcext:value-type="float">
            <text:p>31.6998091473053</text:p>
          </table:table-cell>
          <table:table-cell office:value-type="float" office:value="5875.96073571126" calcext:value-type="float">
            <text:p>5875.96073571126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3.55263157894737" calcext:value-type="float">
            <text:p>3.55263157894737</text:p>
          </table:table-cell>
          <table:table-cell office:value-type="float" office:value="176.647437703907" calcext:value-type="float">
            <text:p>176.647437703907</text:p>
          </table:table-cell>
          <table:table-cell office:value-type="float" office:value="141.346486568758" calcext:value-type="float">
            <text:p>141.346486568758</text:p>
          </table:table-cell>
          <table:table-cell office:value-type="float" office:value="1328.66047474498" calcext:value-type="float">
            <text:p>1328.66047474498</text:p>
          </table:table-cell>
          <table:table-cell office:value-type="float" office:value="211.996721450519" calcext:value-type="float">
            <text:p>211.996721450519</text:p>
          </table:table-cell>
          <table:table-cell office:value-type="float" office:value="1038.4990159551" calcext:value-type="float">
            <text:p>1038.4990159551</text:p>
          </table:table-cell>
          <table:table-cell office:value-type="float" office:value="1063.90573241433" calcext:value-type="float">
            <text:p>1063.90573241433</text:p>
          </table:table-cell>
          <table:table-cell office:value-type="float" office:value="1261.2933671663" calcext:value-type="float">
            <text:p>1261.2933671663</text:p>
          </table:table-cell>
          <table:table-cell office:value-type="string" calcext:value-type="string">
            <text:p>OPTIMAL</text:p>
          </table:table-cell>
          <table:table-cell office:value-type="float" office:value="28.2191333200632" calcext:value-type="float">
            <text:p>28.2191333200632</text:p>
          </table:table-cell>
          <table:table-cell office:value-type="float" office:value="5045.06965268921" calcext:value-type="float">
            <text:p>5045.06965268921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3.94736842105263" calcext:value-type="float">
            <text:p>3.94736842105263</text:p>
          </table:table-cell>
          <table:table-cell office:value-type="float" office:value="183.172593642562" calcext:value-type="float">
            <text:p>183.172593642562</text:p>
          </table:table-cell>
          <table:table-cell office:value-type="float" office:value="148.967048516578" calcext:value-type="float">
            <text:p>148.967048516578</text:p>
          </table:table-cell>
          <table:table-cell office:value-type="float" office:value="1301.98916102885" calcext:value-type="float">
            <text:p>1301.98916102885</text:p>
          </table:table-cell>
          <table:table-cell office:value-type="float" office:value="350.500679570457" calcext:value-type="float">
            <text:p>350.500679570457</text:p>
          </table:table-cell>
          <table:table-cell office:value-type="float" office:value="1473.46368851773" calcext:value-type="float">
            <text:p>1473.46368851773</text:p>
          </table:table-cell>
          <table:table-cell office:value-type="float" office:value="1245.32598063554" calcext:value-type="float">
            <text:p>1245.32598063554</text:p>
          </table:table-cell>
          <table:table-cell office:value-type="float" office:value="1337.15500347027" calcext:value-type="float">
            <text:p>1337.15500347027</text:p>
          </table:table-cell>
          <table:table-cell office:value-type="string" calcext:value-type="string">
            <text:p>OPTIMAL</text:p>
          </table:table-cell>
          <table:table-cell office:value-type="float" office:value="24.8609130934404" calcext:value-type="float">
            <text:p>24.8609130934404</text:p>
          </table:table-cell>
          <table:table-cell office:value-type="float" office:value="4243.41061300323" calcext:value-type="float">
            <text:p>4243.41061300323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4.3421052631579" calcext:value-type="float">
            <text:p>4.3421052631579</text:p>
          </table:table-cell>
          <table:table-cell office:value-type="float" office:value="188.515872410608" calcext:value-type="float">
            <text:p>188.515872410608</text:p>
          </table:table-cell>
          <table:table-cell office:value-type="float" office:value="157.438422071339" calcext:value-type="float">
            <text:p>157.438422071339</text:p>
          </table:table-cell>
          <table:table-cell office:value-type="float" office:value="1277.69289416823" calcext:value-type="float">
            <text:p>1277.69289416823</text:p>
          </table:table-cell>
          <table:table-cell office:value-type="float" office:value="487.756050166257" calcext:value-type="float">
            <text:p>487.756050166257</text:p>
          </table:table-cell>
          <table:table-cell office:value-type="float" office:value="1863.81736043496" calcext:value-type="float">
            <text:p>1863.81736043496</text:p>
          </table:table-cell>
          <table:table-cell office:value-type="float" office:value="1465.53499241999" calcext:value-type="float">
            <text:p>1465.53499241999</text:p>
          </table:table-cell>
          <table:table-cell office:value-type="float" office:value="1416.0098805297" calcext:value-type="float">
            <text:p>1416.0098805297</text:p>
          </table:table-cell>
          <table:table-cell office:value-type="string" calcext:value-type="string">
            <text:p>OPTIMAL</text:p>
          </table:table-cell>
          <table:table-cell office:value-type="float" office:value="21.6100268652602" calcext:value-type="float">
            <text:p>21.6100268652602</text:p>
          </table:table-cell>
          <table:table-cell office:value-type="float" office:value="3467.3738566431" calcext:value-type="float">
            <text:p>3467.3738566431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4.73684210526316" calcext:value-type="float">
            <text:p>4.73684210526316</text:p>
          </table:table-cell>
          <table:table-cell office:value-type="float" office:value="192.94912311645" calcext:value-type="float">
            <text:p>192.94912311645</text:p>
          </table:table-cell>
          <table:table-cell office:value-type="float" office:value="163.58569241757" calcext:value-type="float">
            <text:p>163.58569241757</text:p>
          </table:table-cell>
          <table:table-cell office:value-type="float" office:value="1261.64027355579" calcext:value-type="float">
            <text:p>1261.64027355579</text:p>
          </table:table-cell>
          <table:table-cell office:value-type="float" office:value="590.25487497367" calcext:value-type="float">
            <text:p>590.25487497367</text:p>
          </table:table-cell>
          <table:table-cell office:value-type="float" office:value="2119.2357882709" calcext:value-type="float">
            <text:p>2119.2357882709</text:p>
          </table:table-cell>
          <table:table-cell office:value-type="float" office:value="1643.69305651292" calcext:value-type="float">
            <text:p>1643.69305651292</text:p>
          </table:table-cell>
          <table:table-cell office:value-type="float" office:value="1461.36367229622" calcext:value-type="float">
            <text:p>1461.36367229622</text:p>
          </table:table-cell>
          <table:table-cell office:value-type="string" calcext:value-type="string">
            <text:p>OPTIMAL</text:p>
          </table:table-cell>
          <table:table-cell office:value-type="float" office:value="19.5398644196214" calcext:value-type="float">
            <text:p>19.5398644196214</text:p>
          </table:table-cell>
          <table:table-cell office:value-type="float" office:value="2973.1941048185" calcext:value-type="float">
            <text:p>2973.1941048185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5.13157894736842" calcext:value-type="float">
            <text:p>5.13157894736842</text:p>
          </table:table-cell>
          <table:table-cell office:value-type="float" office:value="196.337910981722" calcext:value-type="float">
            <text:p>196.337910981722</text:p>
          </table:table-cell>
          <table:table-cell office:value-type="float" office:value="177.284275860188" calcext:value-type="float">
            <text:p>177.284275860188</text:p>
          </table:table-cell>
          <table:table-cell office:value-type="float" office:value="1216.36047879715" calcext:value-type="float">
            <text:p>1216.36047879715</text:p>
          </table:table-cell>
          <table:table-cell office:value-type="float" office:value="752.530529255063" calcext:value-type="float">
            <text:p>752.530529255063</text:p>
          </table:table-cell>
          <table:table-cell office:value-type="float" office:value="2873.67820477582" calcext:value-type="float">
            <text:p>2873.67820477582</text:p>
          </table:table-cell>
          <table:table-cell office:value-type="float" office:value="1953.25890946547" calcext:value-type="float">
            <text:p>1953.25890946547</text:p>
          </table:table-cell>
          <table:table-cell office:value-type="float" office:value="1570.52079890533" calcext:value-type="float">
            <text:p>1570.52079890533</text:p>
          </table:table-cell>
          <table:table-cell office:value-type="string" calcext:value-type="string">
            <text:p>OPTIMAL</text:p>
          </table:table-cell>
          <table:table-cell office:value-type="float" office:value="15.4457206558148" calcext:value-type="float">
            <text:p>15.4457206558148</text:p>
          </table:table-cell>
          <table:table-cell office:value-type="float" office:value="1995.85874961749" calcext:value-type="float">
            <text:p>1995.85874961749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5.52631578947368" calcext:value-type="float">
            <text:p>5.52631578947368</text:p>
          </table:table-cell>
          <table:table-cell office:value-type="float" office:value="198.264009865969" calcext:value-type="float">
            <text:p>198.264009865969</text:p>
          </table:table-cell>
          <table:table-cell office:value-type="float" office:value="191.330461818278" calcext:value-type="float">
            <text:p>191.330461818278</text:p>
          </table:table-cell>
          <table:table-cell office:value-type="float" office:value="1183.95047565902" calcext:value-type="float">
            <text:p>1183.95047565902</text:p>
          </table:table-cell>
          <table:table-cell office:value-type="float" office:value="946.263411984142" calcext:value-type="float">
            <text:p>946.263411984142</text:p>
          </table:table-cell>
          <table:table-cell office:value-type="float" office:value="3461.12321266329" calcext:value-type="float">
            <text:p>3461.12321266329</text:p>
          </table:table-cell>
          <table:table-cell office:value-type="float" office:value="2214.7311150429" calcext:value-type="float">
            <text:p>2214.7311150429</text:p>
          </table:table-cell>
          <table:table-cell office:value-type="float" office:value="1695.11551398365" calcext:value-type="float">
            <text:p>1695.11551398365</text:p>
          </table:table-cell>
          <table:table-cell office:value-type="string" calcext:value-type="string">
            <text:p>OPTIMAL</text:p>
          </table:table-cell>
          <table:table-cell office:value-type="float" office:value="11.8512563910198" calcext:value-type="float">
            <text:p>11.8512563910198</text:p>
          </table:table-cell>
          <table:table-cell office:value-type="float" office:value="1137.80460895769" calcext:value-type="float">
            <text:p>1137.80460895769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5.92105263157895" calcext:value-type="float">
            <text:p>5.92105263157895</text:p>
          </table:table-cell>
          <table:table-cell office:value-type="float" office:value="199.019311674405" calcext:value-type="float">
            <text:p>199.019311674405</text:p>
          </table:table-cell>
          <table:table-cell office:value-type="float" office:value="206.475361873231" calcext:value-type="float">
            <text:p>206.475361873231</text:p>
          </table:table-cell>
          <table:table-cell office:value-type="float" office:value="1156.33666078822" calcext:value-type="float">
            <text:p>1156.33666078822</text:p>
          </table:table-cell>
          <table:table-cell office:value-type="float" office:value="1144.63569384083" calcext:value-type="float">
            <text:p>1144.63569384083</text:p>
          </table:table-cell>
          <table:table-cell office:value-type="float" office:value="3959.19711838626" calcext:value-type="float">
            <text:p>3959.19711838626</text:p>
          </table:table-cell>
          <table:table-cell office:value-type="float" office:value="2423.91665213939" calcext:value-type="float">
            <text:p>2423.91665213939</text:p>
          </table:table-cell>
          <table:table-cell office:value-type="float" office:value="1817.13145061034" calcext:value-type="float">
            <text:p>1817.13145061034</text:p>
          </table:table-cell>
          <table:table-cell office:value-type="string" calcext:value-type="string">
            <text:p>OPTIMAL</text:p>
          </table:table-cell>
          <table:table-cell office:value-type="float" office:value="10.5336996282858" calcext:value-type="float">
            <text:p>10.5336996282858</text:p>
          </table:table-cell>
          <table:table-cell office:value-type="float" office:value="823.283458506715" calcext:value-type="float">
            <text:p>823.283458506715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6.31578947368421" calcext:value-type="float">
            <text:p>6.31578947368421</text:p>
          </table:table-cell>
          <table:table-cell office:value-type="float" office:value="198.697655319051" calcext:value-type="float">
            <text:p>198.697655319051</text:p>
          </table:table-cell>
          <table:table-cell office:value-type="float" office:value="227.222380025029" calcext:value-type="float">
            <text:p>227.222380025029</text:p>
          </table:table-cell>
          <table:table-cell office:value-type="float" office:value="1141.45108711058" calcext:value-type="float">
            <text:p>1141.45108711058</text:p>
          </table:table-cell>
          <table:table-cell office:value-type="float" office:value="1350.75786235041" calcext:value-type="float">
            <text:p>1350.75786235041</text:p>
          </table:table-cell>
          <table:table-cell office:value-type="float" office:value="4186.65361777279" calcext:value-type="float">
            <text:p>4186.65361777279</text:p>
          </table:table-cell>
          <table:table-cell office:value-type="float" office:value="2732.24175872428" calcext:value-type="float">
            <text:p>2732.24175872428</text:p>
          </table:table-cell>
          <table:table-cell office:value-type="float" office:value="1963.24358614801" calcext:value-type="float">
            <text:p>1963.24358614801</text:p>
          </table:table-cell>
          <table:table-cell office:value-type="string" calcext:value-type="string">
            <text:p>OPTIMAL</text:p>
          </table:table-cell>
          <table:table-cell office:value-type="float" office:value="12.717481395681" calcext:value-type="float">
            <text:p>12.717481395681</text:p>
          </table:table-cell>
          <table:table-cell office:value-type="float" office:value="1344.58589741626" calcext:value-type="float">
            <text:p>1344.58589741626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6.71052631578947" calcext:value-type="float">
            <text:p>6.71052631578947</text:p>
          </table:table-cell>
          <table:table-cell office:value-type="float" office:value="196.888675436308" calcext:value-type="float">
            <text:p>196.888675436308</text:p>
          </table:table-cell>
          <table:table-cell office:value-type="float" office:value="257.850622052096" calcext:value-type="float">
            <text:p>257.850622052096</text:p>
          </table:table-cell>
          <table:table-cell office:value-type="float" office:value="1133.7581651979" calcext:value-type="float">
            <text:p>1133.7581651979</text:p>
          </table:table-cell>
          <table:table-cell office:value-type="float" office:value="1647.27873837302" calcext:value-type="float">
            <text:p>1647.27873837302</text:p>
          </table:table-cell>
          <table:table-cell office:value-type="float" office:value="4240.01404816128" calcext:value-type="float">
            <text:p>4240.01404816128</text:p>
          </table:table-cell>
          <table:table-cell office:value-type="float" office:value="3059.63439035554" calcext:value-type="float">
            <text:p>3059.63439035554</text:p>
          </table:table-cell>
          <table:table-cell office:value-type="float" office:value="2224.71553640151" calcext:value-type="float">
            <text:p>2224.71553640151</text:p>
          </table:table-cell>
          <table:table-cell office:value-type="string" calcext:value-type="string">
            <text:p>OPTIMAL</text:p>
          </table:table-cell>
          <table:table-cell office:value-type="float" office:value="16.6915821142419" calcext:value-type="float">
            <text:p>16.6915821142419</text:p>
          </table:table-cell>
          <table:table-cell office:value-type="float" office:value="2293.2651235136" calcext:value-type="float">
            <text:p>2293.2651235136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7.10526315789474" calcext:value-type="float">
            <text:p>7.10526315789474</text:p>
          </table:table-cell>
          <table:table-cell office:value-type="float" office:value="193.075399468543" calcext:value-type="float">
            <text:p>193.075399468543</text:p>
          </table:table-cell>
          <table:table-cell office:value-type="float" office:value="312.808647147156" calcext:value-type="float">
            <text:p>312.808647147156</text:p>
          </table:table-cell>
          <table:table-cell office:value-type="float" office:value="1134.91798770263" calcext:value-type="float">
            <text:p>1134.91798770263</text:p>
          </table:table-cell>
          <table:table-cell office:value-type="float" office:value="2156.28131754192" calcext:value-type="float">
            <text:p>2156.28131754192</text:p>
          </table:table-cell>
          <table:table-cell office:value-type="float" office:value="4038.81805342387" calcext:value-type="float">
            <text:p>4038.81805342387</text:p>
          </table:table-cell>
          <table:table-cell office:value-type="float" office:value="3510.84902361538" calcext:value-type="float">
            <text:p>3510.84902361538</text:p>
          </table:table-cell>
          <table:table-cell office:value-type="float" office:value="2747.08886160567" calcext:value-type="float">
            <text:p>2747.08886160567</text:p>
          </table:table-cell>
          <table:table-cell office:value-type="string" calcext:value-type="string">
            <text:p>OPTIMAL</text:p>
          </table:table-cell>
          <table:table-cell office:value-type="float" office:value="24.3497607905673" calcext:value-type="float">
            <text:p>24.3497607905673</text:p>
          </table:table-cell>
          <table:table-cell office:value-type="float" office:value="4121.39066296956" calcext:value-type="float">
            <text:p>4121.39066296956</text:p>
          </table:table-cell>
          <table:table-cell table:formula="of:=268.347" office:value-type="float" office:value="268.347" calcext:value-type="float">
            <text:p>268.34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86.388036970035" calcext:value-type="float">
            <text:p>186.388036970035</text:p>
          </table:table-cell>
          <table:table-cell office:value-type="float" office:value="386.125905767734" calcext:value-type="float">
            <text:p>386.125905767734</text:p>
          </table:table-cell>
          <table:table-cell office:value-type="float" office:value="1143.66057089132" calcext:value-type="float">
            <text:p>1143.66057089132</text:p>
          </table:table-cell>
          <table:table-cell office:value-type="float" office:value="2870.79801472709" calcext:value-type="float">
            <text:p>2870.79801472709</text:p>
          </table:table-cell>
          <table:table-cell office:value-type="float" office:value="3646.20116353082" calcext:value-type="float">
            <text:p>3646.20116353082</text:p>
          </table:table-cell>
          <table:table-cell office:value-type="float" office:value="4124.49113184175" calcext:value-type="float">
            <text:p>4124.49113184175</text:p>
          </table:table-cell>
          <table:table-cell office:value-type="float" office:value="3443.72767841386" calcext:value-type="float">
            <text:p>3443.72767841386</text:p>
          </table:table-cell>
          <table:table-cell office:value-type="string" calcext:value-type="string">
            <text:p>OPTIMAL</text:p>
          </table:table-cell>
          <table:table-cell office:value-type="float" office:value="34.228976987697" calcext:value-type="float">
            <text:p>34.228976987697</text:p>
          </table:table-cell>
          <table:table-cell office:value-type="float" office:value="6479.71216513198" calcext:value-type="float">
            <text:p>6479.71216513198</text:p>
          </table:table-cell>
          <table:table-cell table:formula="of:=268.347" office:value-type="float" office:value="268.347" calcext:value-type="float">
            <text:p>268.3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30T02:34:39.442418953</dc:date>
    <meta:editing-duration>PT1H45M29S</meta:editing-duration>
    <meta:editing-cycles>1</meta:editing-cycles>
    <meta:document-statistic meta:table-count="1" meta:cell-count="252" meta:object-count="1"/>
    <meta:generator>LibreOffice/25.8.6.2$Linux_X86_64 LibreOffice_project/5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8pt" style:letter-kerning="false"/>
    </style:style>
    <style:style style:name="T2" style:family="text">
      <style:text-properties style:text-position="0% 100%" fo:font-family="'Liberation Serif'" style:font-family-generic="roman" fo:font-size="15pt" style:letter-kerning="false" style:font-family-asian="'DejaVu Sans'" style:font-size-asian="10pt" style:font-family-complex="'Noto Sans'" style:font-size-complex="10pt"/>
    </style:style>
    <style:style style:name="T3" style:family="text">
      <style:text-properties fo:font-size="15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3.783cm" svg:y="0.315cm" chart:style-name="ch2">
          <text:p><text:span text:style-name="T1">Unbiased Cost  = f(H2_price)</text:span></text:p>
        </chart:title>
        <chart:legend chart:legend-position="end" svg:x="11.769cm" svg:y="3.952cm" style:legend-expansion="high" chart:style-name="ch3"/>
        <chart:plot-area chart:style-name="ch4" svg:x="1.671cm" svg:y="1.592cm" svg:width="9.778cm" svg:height="5.907cm">
          <chart:coordinate-region svg:x="2.496cm" svg:y="1.791cm" svg:width="8.856cm" svg:height="5.061cm"/>
          <chart:axis chart:dimension="x" chart:name="primary-x" chart:style-name="ch5">
            <chart:title svg:x="5.106cm" svg:y="7.679cm" chart:style-name="ch2">
              <text:p><text:span text:style-name="T2">H2_price (€)</text:span></text:p>
            </chart:title>
          </chart:axis>
          <chart:axis chart:dimension="y" chart:name="primary-y" chart:style-name="ch6">
            <chart:title svg:x="0.451cm" svg:y="5.184cm" chart:style-name="ch7">
              <text:p><text:span text:style-name="T3">Cost</text:span></text:p>
            </chart:title>
            <chart:grid chart:style-name="ch8" chart:class="major"/>
          </chart:axis>
          <chart:series chart:style-name="ch9" chart:values-cell-range-address="'result_for_H2_price_0.0_to_7.5'.C2:'result_for_H2_price_0.0_to_7.5'.C21" chart:label-cell-address="'result_for_H2_price_0.0_to_7.5'.B1:'result_for_H2_price_0.0_to_7.5'.B1" chart:class="chart:scatter">
            <chart:domain table:cell-range-address="'result_for_H2_price_0.0_to_7.5'.A2:'result_for_H2_price_0.0_to_7.5'.A21"/>
            <chart:data-point chart:repeated="20"/>
          </chart:series>
          <chart:series chart:style-name="ch10" chart:values-cell-range-address="'result_for_H2_price_0.0_to_7.5'.L2:'result_for_H2_price_0.0_to_7.5'.L21" loext:label-string="cost_finite_storage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COE</text:p>
                <draw:g>
                  <svg:desc>'result_for_H2_price_0.0_to_7.5'.B1:'result_for_H2_price_0.0_to_7.5'.B1</svg:desc>
                </draw:g>
              </table:table-cell>
              <table:table-cell office:value-type="string">
                <text:p>cost_finite_storag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'result_for_H2_price_0.0_to_7.5'.A2:'result_for_H2_price_0.0_to_7.5'.A21</svg:desc>
                </draw:g>
              </table:table-cell>
              <table:table-cell office:value-type="float" office:value="128.387760483239">
                <text:p>128.387760483239</text:p>
                <draw:g>
                  <svg:desc>'result_for_H2_price_0.0_to_7.5'.C2:'result_for_H2_price_0.0_to_7.5'.C21</svg:desc>
                </draw:g>
              </table:table-cell>
              <table:table-cell office:value-type="float" office:value="268.347">
                <text:p>268.347</text:p>
                <draw:g>
                  <svg:desc>'result_for_H2_price_0.0_to_7.5'.L2:'result_for_H2_price_0.0_to_7.5'.L21</svg:desc>
                </draw:g>
              </table:table-cell>
            </table:table-row>
            <table:table-row>
              <table:table-cell office:value-type="string"/>
              <table:table-cell office:value-type="float" office:value="0.394736842105263">
                <text:p>0.394736842105263</text:p>
              </table:table-cell>
              <table:table-cell office:value-type="float" office:value="128.38776048324">
                <text:p>128.38776048324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0.789473684210526">
                <text:p>0.789473684210526</text:p>
              </table:table-cell>
              <table:table-cell office:value-type="float" office:value="128.387760483239">
                <text:p>128.387760483239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1.18421052631579">
                <text:p>1.18421052631579</text:p>
              </table:table-cell>
              <table:table-cell office:value-type="float" office:value="123.805881181061">
                <text:p>123.805881181061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1.57894736842105">
                <text:p>1.57894736842105</text:p>
              </table:table-cell>
              <table:table-cell office:value-type="float" office:value="125.07062668136">
                <text:p>125.07062668136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1.97368421052632">
                <text:p>1.97368421052632</text:p>
              </table:table-cell>
              <table:table-cell office:value-type="float" office:value="126.74467242189">
                <text:p>126.74467242189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2.36842105263158">
                <text:p>2.36842105263158</text:p>
              </table:table-cell>
              <table:table-cell office:value-type="float" office:value="128.709909152454">
                <text:p>128.709909152454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2.76315789473684">
                <text:p>2.76315789473684</text:p>
              </table:table-cell>
              <table:table-cell office:value-type="float" office:value="130.672225785428">
                <text:p>130.672225785428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3.15789473684211">
                <text:p>3.15789473684211</text:p>
              </table:table-cell>
              <table:table-cell office:value-type="float" office:value="134.948353446746">
                <text:p>134.948353446746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3.55263157894737">
                <text:p>3.55263157894737</text:p>
              </table:table-cell>
              <table:table-cell office:value-type="float" office:value="141.346486568758">
                <text:p>141.346486568758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3.94736842105263">
                <text:p>3.94736842105263</text:p>
              </table:table-cell>
              <table:table-cell office:value-type="float" office:value="148.967048516578">
                <text:p>148.967048516578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4.3421052631579">
                <text:p>4.3421052631579</text:p>
              </table:table-cell>
              <table:table-cell office:value-type="float" office:value="157.438422071339">
                <text:p>157.438422071339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4.73684210526316">
                <text:p>4.73684210526316</text:p>
              </table:table-cell>
              <table:table-cell office:value-type="float" office:value="163.58569241757">
                <text:p>163.58569241757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5.13157894736842">
                <text:p>5.13157894736842</text:p>
              </table:table-cell>
              <table:table-cell office:value-type="float" office:value="177.284275860188">
                <text:p>177.284275860188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5.52631578947368">
                <text:p>5.52631578947368</text:p>
              </table:table-cell>
              <table:table-cell office:value-type="float" office:value="191.330461818278">
                <text:p>191.330461818278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5.92105263157895">
                <text:p>5.92105263157895</text:p>
              </table:table-cell>
              <table:table-cell office:value-type="float" office:value="206.475361873231">
                <text:p>206.475361873231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6.31578947368421">
                <text:p>6.31578947368421</text:p>
              </table:table-cell>
              <table:table-cell office:value-type="float" office:value="227.222380025029">
                <text:p>227.222380025029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6.71052631578947">
                <text:p>6.71052631578947</text:p>
              </table:table-cell>
              <table:table-cell office:value-type="float" office:value="257.850622052096">
                <text:p>257.850622052096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7.10526315789474">
                <text:p>7.10526315789474</text:p>
              </table:table-cell>
              <table:table-cell office:value-type="float" office:value="312.808647147156">
                <text:p>312.808647147156</text:p>
              </table:table-cell>
              <table:table-cell office:value-type="float" office:value="268.347">
                <text:p>268.347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386.125905767734">
                <text:p>386.125905767734</text:p>
              </table:table-cell>
              <table:table-cell office:value-type="float" office:value="268.347">
                <text:p>268.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